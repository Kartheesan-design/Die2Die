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8403EDA729.png" manifest:media-type="image/png"/>
  <manifest:file-entry manifest:full-path="Pictures/100000010000073E00000484E6F160EA.png" manifest:media-type="image/png"/>
  <manifest:file-entry manifest:full-path="Pictures/100000010000073E00000484AB5E35F6.png" manifest:media-type="image/png"/>
  <manifest:file-entry manifest:full-path="Pictures/100000010000073E000004848E3F3459.png" manifest:media-type="image/png"/>
  <manifest:file-entry manifest:full-path="Pictures/10000001000007430000048AA072D285.png" manifest:media-type="image/png"/>
  <manifest:file-entry manifest:full-path="Pictures/100000010000073E00000484AB882EB4.png" manifest:media-type="image/png"/>
  <manifest:file-entry manifest:full-path="Pictures/100000010000073B000004878936BC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Table1" style:family="table">
      <style:table-properties style:width="2.0069in" table:align="left"/>
    </style:style>
    <style:style style:name="Table1.A" style:family="table-column">
      <style:table-column-properties style:column-width="0.5097in"/>
    </style:style>
    <style:style style:name="Table1.B" style:family="table-column">
      <style:table-column-properties style:column-width="1.4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941a6"/>
    </style:style>
    <style:style style:name="P3" style:family="paragraph" style:parent-style-name="Preformatted_20_Text">
      <style:paragraph-properties fo:margin-left="0in" fo:margin-right="0in" fo:margin-top="0.1252in" fo:margin-bottom="0.1252in" style:contextual-spacing="false" fo:text-indent="0in" style:auto-text-indent="false"/>
      <style:text-properties fo:color="#303030" loext:opacity="100%"/>
    </style:style>
    <style:style style:name="P4" style:family="paragraph" style:parent-style-name="Preformatted_20_Text">
      <style:paragraph-properties fo:margin-left="0in" fo:margin-right="0in" fo:margin-top="0.1252in" fo:margin-bottom="0.1252in" style:contextual-spacing="false"/>
      <style:text-properties fo:color="#303030" loext:opacity="100%"/>
    </style:style>
    <style:style style:name="P5" style:family="paragraph" style:parent-style-name="Preformatted_20_Text">
      <style:paragraph-properties fo:margin-left="0in" fo:margin-right="0in" fo:margin-top="0.1252in" fo:margin-bottom="0.1252in" style:contextual-spacing="false" fo:text-indent="0in" style:auto-text-indent="false"/>
      <style:text-properties fo:color="#000000" loext:opacity="100%" officeooo:paragraph-rsid="001e581e"/>
    </style:style>
    <style:style style:name="P6" style:family="paragraph" style:parent-style-name="Standard">
      <style:text-properties fo:color="#000000" loext:opacity="100%" officeooo:paragraph-rsid="001a4988"/>
    </style:style>
    <style:style style:name="P7" style:family="paragraph" style:parent-style-name="Standard">
      <style:text-properties fo:color="#000000" loext:opacity="100%" officeooo:paragraph-rsid="001cd2a5"/>
    </style:style>
    <style:style style:name="P8" style:family="paragraph" style:parent-style-name="Standard">
      <style:text-properties fo:color="#000000" loext:opacity="100%" officeooo:paragraph-rsid="001e581e"/>
    </style:style>
    <style:style style:name="P9" style:family="paragraph" style:parent-style-name="Standard">
      <style:text-properties fo:color="#000000" loext:opacity="100%" officeooo:paragraph-rsid="001f9ebf"/>
    </style:style>
    <style:style style:name="P10" style:family="paragraph" style:parent-style-name="Standard">
      <style:text-properties officeooo:paragraph-rsid="001cd2a5"/>
    </style:style>
    <style:style style:name="P11" style:family="paragraph" style:parent-style-name="Standard">
      <style:paragraph-properties fo:text-align="start" style:justify-single-word="false"/>
      <style:text-properties officeooo:paragraph-rsid="001cd2a5"/>
    </style:style>
    <style:style style:name="P12" style:family="paragraph" style:parent-style-name="Text_20_body">
      <style:text-properties officeooo:paragraph-rsid="001cd2a5"/>
    </style:style>
    <style:style style:name="P13" style:family="paragraph" style:parent-style-name="Text_20_body">
      <style:text-properties fo:color="#000000" loext:opacity="100%" officeooo:paragraph-rsid="001a4988"/>
    </style:style>
    <style:style style:name="P14" style:family="paragraph" style:parent-style-name="Text_20_body">
      <style:text-properties fo:color="#000000" loext:opacity="100%" officeooo:paragraph-rsid="001e581e"/>
    </style:style>
    <style:style style:name="P15" style:family="paragraph" style:parent-style-name="Text_20_body">
      <style:text-properties fo:color="#000000" loext:opacity="100%" officeooo:paragraph-rsid="001f9ebf"/>
    </style:style>
    <style:style style:name="T1" style:family="text">
      <style:text-properties fo:color="#eaecf0" loext:opacity="100%" style:font-name="var font-mono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8pt" fo:font-weight="bold" officeooo:rsid="001941a6" style:font-size-asian="15.75pt" style:font-weight-asian="bold" style:font-size-complex="18pt" style:font-weight-complex="bold"/>
    </style:style>
    <style:style style:name="T5" style:family="text">
      <style:text-properties fo:color="#000000" loext:opacity="100%" officeooo:rsid="001a4988"/>
    </style:style>
    <style:style style:name="T6" style:family="text">
      <style:text-properties fo:color="#000000" loext:opacity="100%" fo:font-weight="bold" officeooo:rsid="001a4988" style:font-weight-asian="bold" style:font-weight-complex="bold"/>
    </style:style>
    <style:style style:name="T7" style:family="text">
      <style:text-properties fo:color="#000000" loext:opacity="100%" fo:font-size="16pt" fo:font-weight="bold" officeooo:rsid="001a4988" style:font-size-asian="16pt" style:font-weight-asian="bold" style:font-size-complex="16pt" style:font-weight-complex="bold"/>
    </style:style>
    <style:style style:name="T8" style:family="text">
      <style:text-properties fo:color="#000000" loext:opacity="100%" fo:font-size="16pt" officeooo:rsid="001a4988" style:font-size-asian="16pt" style:font-size-complex="16pt"/>
    </style:style>
    <style:style style:name="T9" style:family="text">
      <style:text-properties fo:color="#000000" loext:opacity="100%" fo:font-size="16pt" fo:font-weight="normal" officeooo:rsid="001a4988" style:font-size-asian="16pt" style:font-weight-asian="normal" style:font-size-complex="16pt" style:font-weight-complex="normal"/>
    </style:style>
    <style:style style:name="T10" style:family="text">
      <style:text-properties fo:color="#000000" loext:opacity="100%" fo:font-weight="normal" officeooo:rsid="001a4988" style:font-weight-asian="normal" style:font-weight-complex="normal"/>
    </style:style>
    <style:style style:name="T11" style:family="text">
      <style:text-properties fo:color="#000000" loext:opacity="100%" fo:font-size="12pt" fo:font-weight="normal" officeooo:rsid="001a4988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officeooo:rsid="001a4988"/>
    </style:style>
    <style:style style:name="T14" style:family="text">
      <style:text-properties fo:font-size="18pt" fo:font-weight="bold" officeooo:rsid="001cd2a5" style:font-size-asian="15.75pt" style:font-weight-asian="bold" style:font-size-complex="18pt" style:font-weight-complex="bold"/>
    </style:style>
    <style:style style:name="T15" style:family="text">
      <style:text-properties fo:color="#9be963" loext:opacity="100%" fo:font-size="16pt" fo:font-weight="bold" officeooo:rsid="001a4988" style:font-size-asian="16pt" style:font-weight-asian="bold" style:font-size-complex="16pt" style:font-weight-complex="bold"/>
    </style:style>
    <style:style style:name="T16" style:family="text">
      <style:text-properties fo:color="#9be963" loext:opacity="100%" fo:font-size="16pt" fo:font-weight="bold" officeooo:rsid="001f9ebf" style:font-size-asian="16pt" style:font-weight-asian="bold" style:font-size-complex="16pt" style:font-weight-complex="bold"/>
    </style:style>
    <style:style style:name="T17" style:family="text">
      <style:text-properties fo:color="#9be963" loext:opacity="100%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weight="bold" officeooo:rsid="001a4988" style:font-weight-asian="bold" style:font-weight-complex="bold"/>
    </style:style>
    <style:style style:name="T19" style:family="text">
      <style:text-properties fo:font-weight="bold" officeooo:rsid="001f9ebf" style:font-weight-asian="bold" style:font-weight-complex="bold"/>
    </style:style>
    <style:style style:name="T20" style:family="text">
      <style:text-properties fo:font-size="16pt" officeooo:rsid="001a4988" style:font-size-asian="16pt" style:font-size-complex="16pt"/>
    </style:style>
    <style:style style:name="T21" style:family="text">
      <style:text-properties fo:font-size="16pt" officeooo:rsid="001f9ebf" style:font-size-asian="16pt" style:font-size-complex="16pt"/>
    </style:style>
    <style:style style:name="T22" style:family="text">
      <style:text-properties fo:font-size="16pt" fo:font-weight="bold" officeooo:rsid="001a4988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1f9ebf" style:font-size-asian="16pt" style:font-weight-asian="bold" style:font-size-complex="16pt" style:font-weight-complex="bold"/>
    </style:style>
    <style:style style:name="T24" style:family="text">
      <style:text-properties fo:font-size="16pt" fo:font-weight="normal" officeooo:rsid="001a4988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1f9ebf" style:font-size-asian="16pt" style:font-weight-asian="normal" style:font-size-complex="16pt" style:font-weight-complex="normal"/>
    </style:style>
    <style:style style:name="T26" style:family="text">
      <style:text-properties fo:font-weight="normal" officeooo:rsid="001a4988" style:font-weight-asian="normal" style:font-weight-complex="normal"/>
    </style:style>
    <style:style style:name="T27" style:family="text">
      <style:text-properties fo:font-weight="normal" officeooo:rsid="001f9ebf" style:font-weight-asian="normal" style:font-weight-complex="normal"/>
    </style:style>
    <style:style style:name="T28" style:family="text">
      <style:text-properties fo:font-size="12pt" officeooo:rsid="001f9ebf" style:font-size-asian="12pt" style:font-size-complex="12pt"/>
    </style:style>
    <style:style style:name="T29" style:family="text">
      <style:text-properties fo:font-size="12pt" fo:font-weight="normal" officeooo:rsid="001a4988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f9eb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1f9ebf" style:font-size-asian="12pt" style:font-weight-asian="bold" style:font-size-complex="12pt" style:font-weight-complex="bold"/>
    </style:style>
    <style:style style:name="T33" style:family="text">
      <style:text-properties style:font-name="var font-mono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Mono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color="#303030" loext:opacity="100%" fo:font-size="12pt" fo:font-weight="normal" officeooo:rsid="001f9ebf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OpenROAD</text:span></text:span></text:p>
      <text:p text:style-name="P1"><text:span text:style-name="Source_20_Text"><text:span text:style-name="T3"/></text:span></text:p>
      <text:p text:style-name="P2"><text:span text:style-name="Source_20_Text"><text:span text:style-name="T4">Floorplanning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# Step 1 — Load libraries and design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# Step 2 — Floorplan (you'll see the die box appear)</text:span></text:span></text:p>
      <text:p text:style-name="Standard"><text:span text:style-name="Source_20_Text"><text:span text:style-name="T2">initialize_floorplan \</text:span></text:span></text:p>
      <text:p text:style-name="Standard"><text:span text:style-name="Source_20_Text"><text:span text:style-name="T2"><text:s text:c="2"/>-die_area <text:s/>"0 0 600 600" \</text:span></text:span></text:p>
      <text:p text:style-name="Standard"><text:span text:style-name="Source_20_Text"><text:span text:style-name="T2"><text:s text:c="2"/>-core_area "10 10 590 590" \</text:span></text:span></text:p>
      <text:p text:style-name="Standard"><text:span text:style-name="Source_20_Text"><text:span text:style-name="T2"><text:s text:c="2"/>-site <text:s text:c="5"/>unithd</text:span></text:span></text:p>
      <text:p text:style-name="Standard"><text:span text:style-name="Source_20_Text"><text:span text:style-name="T2"/></text:span></text:p>
      <text:p text:style-name="Standard"><draw:frame draw:style-name="fr2" draw:name="Image1" text:anchor-type="char" svg:width="6.6929in" svg:height="4.1902in" draw:z-index="0"><draw:image xlink:href="Pictures/100000010000073B000004878936BCEA.png" xlink:type="simple" xlink:show="embed" xlink:actuate="onLoad" draw:mime-type="image/png"/></draw:frame><text:span text:style-name="Source_20_Text"><text:span text:style-name="T2"><text:s text:c="2"/></text:span></text:span></text:p>
      <text:p text:style-name="Standard"><text:span text:style-name="Source_20_Text"><text:span text:style-name="T2"/></text:span></text:p>
      <text:p text:style-name="P10"><text:span text:style-name="Source_20_Text"><text:span text:style-name="T2"># ---- Step 3: Routing tracks ---- </text:span></text:span></text:p>
      <text:p text:style-name="P10"><text:span text:style-name="Source_20_Text"><text:span text:style-name="T2">make_tracks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# ---- Step 4: Power connections ---- </text:span></text:span></text:p>
      <text:p text:style-name="P10"><text:span text:style-name="Source_20_Text"><text:span text:style-name="T2">add_global_connection -net VDD -pin_pattern {^VPWR$} -power add_global_connection -net VSS -pin_pattern {^VGND$} -ground global_connect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2"><text:soft-page-break/><text:span text:style-name="Source_20_Text"><text:span text:style-name="T2"># ---- Step 5: PDN — load config then generate ---- </text:span></text:span></text:p>
      <text:p text:style-name="P12"><text:span text:style-name="Source_20_Text"><text:span text:style-name="T2">source pdn.cfg </text:span></text:span></text:p>
      <text:p text:style-name="P12"><text:span text:style-name="Source_20_Text"><text:span text:style-name="T2">pdngen</text:span></text:span><text:span text:style-name="T2"/></text:p>
      <text:h text:style-name="Heading_20_3" text:outline-level="3"><draw:frame draw:style-name="fr1" draw:name="Image3" text:anchor-type="char" svg:x="-0.1547in" svg:y="-0.0098in" svg:width="6.6929in" svg:height="4.1835in" draw:z-index="1"><draw:image xlink:href="Pictures/10000001000007430000048AA072D285.png" xlink:type="simple" xlink:show="embed" xlink:actuate="onLoad" draw:mime-type="image/png"/></draw:frame><text:span text:style-name="Source_20_Text"><text:span text:style-name="T2"/></text:span></text:h>
      <text:h text:style-name="Heading_20_3" text:outline-level="3"><text:span text:style-name="Source_20_Text"><text:span text:style-name="T2">Sky130 Metal Layer Directions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Preferred Direction</text:p>
            </table:table-cell>
          </table:table-row>
        </table:table-header-rows>
        <table:table-row>
          <table:table-cell table:style-name="Table1.A1" office:value-type="string">
            <text:p text:style-name="Table_20_Contents">met1</text:p>
          </table:table-cell>
          <table:table-cell table:style-name="Table1.A1" office:value-type="string">
            <text:p text:style-name="Table_20_Contents">Horizontal</text:p>
          </table:table-cell>
        </table:table-row>
        <table:table-row>
          <table:table-cell table:style-name="Table1.A1" office:value-type="string">
            <text:p text:style-name="Table_20_Contents">met2</text:p>
          </table:table-cell>
          <table:table-cell table:style-name="Table1.A1" office:value-type="string">
            <text:p text:style-name="Table_20_Contents"><text:span text:style-name="Strong_20_Emphasis">Vertical</text:span></text:p>
          </table:table-cell>
        </table:table-row>
        <table:table-row>
          <table:table-cell table:style-name="Table1.A1" office:value-type="string">
            <text:p text:style-name="Table_20_Contents">met3</text:p>
          </table:table-cell>
          <table:table-cell table:style-name="Table1.A1" office:value-type="string">
            <text:p text:style-name="Table_20_Contents"><text:span text:style-name="Strong_20_Emphasis">Horizontal</text:span></text:p>
          </table:table-cell>
        </table:table-row>
        <table:table-row>
          <table:table-cell table:style-name="Table1.A1" office:value-type="string">
            <text:p text:style-name="Table_20_Contents">met4</text:p>
          </table:table-cell>
          <table:table-cell table:style-name="Table1.A1" office:value-type="string">
            <text:p text:style-name="Table_20_Contents">Vertical</text:p>
          </table:table-cell>
        </table:table-row>
        <table:table-row>
          <table:table-cell table:style-name="Table1.A1" office:value-type="string">
            <text:p text:style-name="Table_20_Contents">met5</text:p>
          </table:table-cell>
          <table:table-cell table:style-name="Table1.A1" office:value-type="string">
            <text:p text:style-name="Table_20_Contents">Horizontal</text:p>
          </table:table-cell>
        </table:table-row>
      </table:table>
      <text:p text:style-name="Standard"><text:span text:style-name="Source_20_Text"><text:span text:style-name="T2"/></text:span></text:p>
      <text:p text:style-name="Standard"><text:span text:style-name="Source_20_Text"><text:span text:style-name="T2"><text:s text:c="7"/>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7"><text:span text:style-name="Source_20_Text"><text:span text:style-name="T13"># ---- Step 6: IO pin placement ---- </text:span></text:span></text:p>
      <text:p text:style-name="P7"><text:span text:style-name="Source_20_Text"><text:span text:style-name="T13">place_pins -hor_layers met3 -ver_layers met2</text:span></text:span><text:span text:style-name="T5"/></text:p>
      <text:p text:style-name="P6"><draw:frame draw:style-name="fr1" draw:name="Image4" text:anchor-type="char" svg:x="0in" svg:y="0.1in" svg:width="6.6929in" svg:height="4.1728in" draw:z-index="2"><draw:image xlink:href="Pictures/100000010000073E00000484AB5E35F6.png" xlink:type="simple" xlink:show="embed" xlink:actuate="onLoad" draw:mime-type="image/png"/></draw:frame><text:soft-page-break/><text:span text:style-name="Source_20_Text"><text:span text:style-name="T5"/></text:span></text:p>
      <text:p text:style-name="P6"><text:span text:style-name="Source_20_Text"><text:span text:style-name="T5"/></text:span></text:p>
      <text:p text:style-name="P7"><text:span text:style-name="Source_20_Text"><text:span text:style-name="T5"/></text:span></text:p>
      <text:p text:style-name="P11"><text:span text:style-name="Source_20_Text"><text:span text:style-name="T14">Placement</text:span></text:span></text:p>
      <text:p text:style-name="P7"><text:span text:style-name="Source_20_Text"><text:span text:style-name="T5"/></text:span></text:p>
      <text:p text:style-name="P7"><text:span text:style-name="Source_20_Text"><text:span text:style-name="T13"># ---- Step 7: Global placement ---- </text:span></text:span></text:p>
      <text:p text:style-name="P7"><text:span text:style-name="Source_20_Text"><text:span text:style-name="T13">global_placement -density 0.65</text:span></text:span><text:span text:style-name="T5"/></text:p>
      <text:p text:style-name="P6"><draw:frame draw:style-name="fr1" draw:name="Image6" text:anchor-type="char" svg:x="-0.1835in" svg:y="0.1882in" svg:width="6.6929in" svg:height="4.1728in" draw:z-index="4"><draw:image xlink:href="Pictures/100000010000073E00000484E6F160EA.png" xlink:type="simple" xlink:show="embed" xlink:actuate="onLoad" draw:mime-type="image/png"/></draw:frame><text:span text:style-name="Source_20_Text"><text:span text:style-name="T5"/></text:span></text:p>
      <text:p text:style-name="P6"><text:soft-page-break/><text:span text:style-name="Source_20_Text"><text:span text:style-name="T5"/></text:span></text:p>
      <text:p text:style-name="P6"><text:span text:style-name="Source_20_Text"><text:span text:style-name="T5"/></text:span></text:p>
      <text:p text:style-name="P7"><text:span text:style-name="Source_20_Text"><text:span text:style-name="T13"># ---- Step 8: Detailed placement ---- </text:span></text:span></text:p>
      <text:p text:style-name="P7"><text:span text:style-name="Source_20_Text"><text:span text:style-name="T13">detailed_placement</text:span></text:span><text:span text:style-name="T5"/></text:p>
      <text:p text:style-name="P6"><text:span text:style-name="Source_20_Text"><text:span text:style-name="T5"/></text:span></text:p>
      <text:p text:style-name="P6"><draw:frame draw:style-name="fr1" draw:name="Image5" text:anchor-type="char" svg:x="-0.0335in" svg:y="0.0075in" svg:width="6.6929in" svg:height="4.1728in" draw:z-index="3"><draw:image xlink:href="Pictures/100000010000073E000004848E3F3459.png" xlink:type="simple" xlink:show="embed" xlink:actuate="onLoad" draw:mime-type="image/png"/></draw:frame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7"><text:span text:style-name="Source_20_Text"><text:span text:style-name="T13"># ---- Step 9: Check ---- </text:span></text:span></text:p>
      <text:p text:style-name="P7"><text:span text:style-name="Source_20_Text"><text:span text:style-name="T13">check_placement -verbose</text:span></text:span><text:span text:style-name="T5"/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13"><text:span text:style-name="Source_20_Text"><text:span text:style-name="T13">report_design_area</text:span></text:span></text:p>
      <text:p text:style-name="P3">Design area 77288 um^2 23% utilization.</text:p>
      <text:p text:style-name="P3"/>
      <text:p text:style-name="P3"/>
      <text:p text:style-name="P3">write_def picorv32_placed.def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># Tell CTS which net is the clock and what buffer cells to use </text:p>
      <text:p text:style-name="P5">create_clock -name clk -period 20 [get_ports clk] </text:p>
      <text:p text:style-name="P5">set_wire_rc -clock \ -layer met3 </text:p>
      <text:p text:style-name="P5">configure_cts_characterization \ -max_slew 0.5 \ -max_cap 0.2</text:p>
      <text:p text:style-name="P5"><text:s/>clock_tree_synthesis \ -root_buf sky130_fd_sc_hd__clkbuf_16 \ -buf_list {sky130_fd_sc_hd__clkbuf_4 \ sky130_fd_sc_hd__clkbuf_8 \ sky130_fd_sc_hd__clkbuf_16} \ -sink_clustering_enable</text:p>
      <text:p text:style-name="P6"><text:span text:style-name="Source_20_Text"><text:span text:style-name="T5"/></text:span></text:p>
      <text:p text:style-name="P8"><text:span text:style-name="Source_20_Text"><text:span text:style-name="T13"># Fix placement after CTS inserts buffers </text:span></text:span></text:p>
      <text:p text:style-name="P8"><text:span text:style-name="Source_20_Text"><text:span text:style-name="T13">set_propagated_clock [all_clocks] </text:span></text:span></text:p>
      <text:p text:style-name="P8"><text:span text:style-name="Source_20_Text"><text:span text:style-name="T2"/></text:span></text:p>
      <text:p text:style-name="P8"><text:span text:style-name="Source_20_Text"><text:span text:style-name="T13">detailed_placement </text:span></text:span></text:p>
      <text:p text:style-name="P8"><draw:frame draw:style-name="fr1" draw:name="Image2" text:anchor-type="char" svg:x="0.0252in" svg:y="0.078in" svg:width="6.6929in" svg:height="4.1728in" draw:z-index="5"><draw:image xlink:href="Pictures/100000010000073E00000484AB882EB4.png" xlink:type="simple" xlink:show="embed" xlink:actuate="onLoad" draw:mime-type="image/png"/></draw:frame><text:span text:style-name="Source_20_Text"/></text:p>
      <text:p text:style-name="P8"><text:span text:style-name="Source_20_Text"/></text:p>
      <text:p text:style-name="P8"><text:span text:style-name="Source_20_Text"><text:span text:style-name="T13">check_placement -verbose </text:span></text:span></text:p>
      <text:p text:style-name="P8"><text:span text:style-name="Source_20_Text"><text:span text:style-name="T2"/></text:span></text:p>
      <text:p text:style-name="P8"><text:span text:style-name="Source_20_Text"><text:span text:style-name="T13">write_def picorv32_cts.def 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oft-page-break/><text:span text:style-name="Source_20_Text"><text:span text:style-name="T22">POST-CTS TIMING</text:span></text:span></text:p>
      <text:p text:style-name="P6"><text:span text:style-name="Source_20_Text"><text:span text:style-name="T7"/></text:span></text:p>
      <text:p text:style-name="P8"><text:span text:style-name="Source_20_Text"><text:span text:style-name="T29">set_wire_rc -signal -layer met2 </text:span></text:span></text:p>
      <text:p text:style-name="P8"><text:span text:style-name="Source_20_Text"><text:span text:style-name="T11"/></text:span></text:p>
      <text:p text:style-name="P8"><text:span text:style-name="Source_20_Text"><text:span text:style-name="T29">estimate_parasitics -placement </text:span></text:span></text:p>
      <text:p text:style-name="P8"><text:span text:style-name="Source_20_Text"><text:span text:style-name="T29"/></text:span></text:p>
      <text:p text:style-name="P14"><text:span text:style-name="Source_20_Text"><text:span text:style-name="T29">report_checks -path_delay max -fields {slew cap input fanout}</text:span></text:span></text:p>
      <text:p text:style-name="P3">Startpoint: _13915_ (rising edge-triggered flip-flop clocked by clk)</text:p>
      <text:p text:style-name="P3">Endpoint: _13679_ (rising edge-triggered flip-flop clocked by clk)</text:p>
      <text:p text:style-name="P4">Path Group: clk</text:p>
      <text:p text:style-name="P4">Path Type: max</text:p>
      <text:p text:style-name="P4">Fanout <text:s text:c="4"/>Cap <text:s text:c="3"/>Slew <text:s text:c="2"/>Delay <text:s text:c="3"/>Time <text:s text:c="2"/>Description</text:p>
      <text:p text:style-name="P4">-----------------------------------------------------------------------------</text:p>
      <text:p text:style-name="P4"><text:s text:c="26"/>0.00 <text:s text:c="3"/>0.00 <text:s text:c="2"/>clock clk (rise edge)</text:p>
      <text:p text:style-name="P4"><text:s text:c="26"/>0.65 <text:s text:c="3"/>0.65 <text:s text:c="2"/>clock network delay (propagated)</text:p>
      <text:p text:style-name="P4"><text:s text:c="18"/>0.06 <text:s text:c="3"/>0.00 <text:s text:c="3"/>0.65 ^ _13915_/CLK (sky130_fd_sc_hd__dfxtp_1)</text:p>
      <text:p text:style-name="P4"><text:s text:c="3"/>256 <text:s text:c="3"/>1.71 <text:s text:c="2"/>15.68 <text:s text:c="2"/>11.13 <text:s text:c="2"/>11.78 ^ _13915_/Q (sky130_fd_sc_hd__dfxtp_1)</text:p>
      <text:p text:style-name="P4"><text:s text:c="17"/>15.69 <text:s text:c="3"/>0.23 <text:s text:c="2"/>12.02 ^ _09380_/S1 (sky130_fd_sc_hd__mux4_2)</text:p>
      <text:p text:style-name="P4"><text:s text:c="5"/>1 <text:s text:c="3"/>0.00 <text:s text:c="3"/>0.43 <text:s text:c="3"/>1.90 <text:s text:c="2"/>13.92 ^ _09380_/X (sky130_fd_sc_hd__mux4_2)</text:p>
      <text:p text:style-name="P4"><text:s text:c="18"/>0.43 <text:s text:c="3"/>0.00 <text:s text:c="2"/>13.92 ^ _09382_/A1 (sky130_fd_sc_hd__mux4_2)</text:p>
      <text:p text:style-name="P4"><text:s text:c="5"/>1 <text:s text:c="3"/>0.00 <text:s text:c="3"/>0.14 <text:s text:c="3"/>0.32 <text:s text:c="2"/>14.24 ^ _09382_/X (sky130_fd_sc_hd__mux4_2)</text:p>
      <text:p text:style-name="P4"><text:s text:c="18"/>0.14 <text:s text:c="3"/>0.00 <text:s text:c="2"/>14.24 ^ _09383_/A1 (sky130_fd_sc_hd__mux2i_1)</text:p>
      <text:p text:style-name="P4"><text:s text:c="5"/>1 <text:s text:c="3"/>0.02 <text:s text:c="3"/>0.44 <text:s text:c="3"/>0.19 <text:s text:c="2"/>14.43 v _09383_/Y (sky130_fd_sc_hd__mux2i_1)</text:p>
      <text:p text:style-name="P4"><text:s text:c="18"/>0.44 <text:s text:c="3"/>0.00 <text:s text:c="2"/>14.43 v _09385_/A2 (sky130_fd_sc_hd__o22a_1)</text:p>
      <text:p text:style-name="P4"><text:s text:c="5"/>1 <text:s text:c="3"/>0.00 <text:s text:c="3"/>0.05 <text:s text:c="3"/>0.35 <text:s text:c="2"/>14.78 v _09385_/X (sky130_fd_sc_hd__o22a_1)</text:p>
      <text:p text:style-name="P4"><text:s text:c="18"/>0.05 <text:s text:c="3"/>0.00 <text:s text:c="2"/>14.78 v _09386_/B1 (sky130_fd_sc_hd__o32ai_1)</text:p>
      <text:p text:style-name="P4"><text:s text:c="5"/>1 <text:s text:c="3"/>0.00 <text:s text:c="3"/>0.44 <text:s text:c="3"/>0.12 <text:s text:c="2"/>14.90 ^ _09386_/Y (sky130_fd_sc_hd__o32ai_1)</text:p>
      <text:p text:style-name="P4"><text:s text:c="18"/>0.44 <text:s text:c="3"/>0.00 <text:s text:c="2"/>14.90 ^ _09388_/B1 (sky130_fd_sc_hd__a31oi_1)</text:p>
      <text:p text:style-name="P4"><text:soft-page-break/><text:s text:c="5"/>1 <text:s text:c="3"/>0.00 <text:s text:c="3"/>0.14 <text:s text:c="3"/>0.06 <text:s text:c="2"/>14.96 v _09388_/Y (sky130_fd_sc_hd__a31oi_1)</text:p>
      <text:p text:style-name="P4"><text:s text:c="18"/>0.14 <text:s text:c="3"/>0.00 <text:s text:c="2"/>14.96 v _09389_/A2 (sky130_fd_sc_hd__o21ai_0)</text:p>
      <text:p text:style-name="P4"><text:s text:c="5"/>1 <text:s text:c="3"/>0.00 <text:s text:c="3"/>0.35 <text:s text:c="3"/>0.16 <text:s text:c="2"/>15.12 ^ _09389_/Y (sky130_fd_sc_hd__o21ai_0)</text:p>
      <text:p text:style-name="P4"><text:s text:c="18"/>0.35 <text:s text:c="3"/>0.00 <text:s text:c="2"/>15.12 ^ _13679_/D (sky130_fd_sc_hd__dfxtp_1)</text:p>
      <text:p text:style-name="P4"><text:s text:c="33"/>15.12 <text:s text:c="2"/>data arrival time</text:p>
      <text:p text:style-name="P4"><text:s text:c="25"/>20.00 <text:s text:c="2"/>20.00 <text:s text:c="2"/>clock clk (rise edge)</text:p>
      <text:p text:style-name="P4"><text:s text:c="26"/>0.65 <text:s text:c="2"/>20.65 <text:s text:c="2"/>clock network delay (propagated)</text:p>
      <text:p text:style-name="P4"><text:s text:c="26"/>0.00 <text:s text:c="2"/>20.65 <text:s text:c="2"/>clock reconvergence pessimism</text:p>
      <text:p text:style-name="P4"><text:s text:c="33"/>20.65 ^ _13679_/CLK (sky130_fd_sc_hd__dfxtp_1)</text:p>
      <text:p text:style-name="P4"><text:s text:c="25"/>-0.12 <text:s text:c="2"/>20.52 <text:s text:c="2"/>library setup time</text:p>
      <text:p text:style-name="P4"><text:s text:c="33"/>20.52 <text:s text:c="2"/>data required time</text:p>
      <text:p text:style-name="P4">-----------------------------------------------------------------------------</text:p>
      <text:p text:style-name="P4"><text:s text:c="33"/>20.52 <text:s text:c="2"/>data required time</text:p>
      <text:p text:style-name="P4"><text:s text:c="32"/>-15.12 <text:s text:c="2"/>data arrival time</text:p>
      <text:p text:style-name="P4">-----------------------------------------------------------------------------</text:p>
      <text:p text:style-name="P4"><text:s text:c="34"/>5.40 <text:s text:c="2"/>slack (MET)</text:p>
      <text:p text:style-name="P8"><text:span text:style-name="Source_20_Text"><text:span text:style-name="T29"><text:s/></text:span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14"><text:span text:style-name="Source_20_Text"><text:span text:style-name="T29">&gt;&gt;&gt; report_wns</text:span></text:span></text:p>
      <text:p text:style-name="P3">wns max 0.00</text:p>
      <text:p text:style-name="P8"><text:span text:style-name="Source_20_Text"><text:span text:style-name="T29"/></text:span></text:p>
      <text:p text:style-name="P14"><text:span text:style-name="Source_20_Text"><text:span text:style-name="T29">&gt;&gt;&gt; report_tns</text:span></text:span></text:p>
      <text:p text:style-name="P3">tns max 0.00</text:p>
      <text:p text:style-name="P14"><text:span text:style-name="Source_20_Text"><text:span text:style-name="T29">&gt;&gt;&gt; report_worst_slack -max</text:span></text:span></text:p>
      <text:p text:style-name="P3">worst slack max 5.40</text:p>
      <text:p text:style-name="P14"><text:span text:style-name="Source_20_Text"><text:span text:style-name="T29">&gt;&gt;&gt; report_worst_slack -min</text:span></text:span></text:p>
      <text:p text:style-name="P3">worst slack min 0.43</text:p>
      <text:p text:style-name="P8"><draw:frame draw:style-name="fr1" draw:name="Image7" text:anchor-type="char" svg:x="0.0417in" svg:y="-0.028in" svg:width="6.6929in" svg:height="4.1728in" draw:z-index="6"><draw:image xlink:href="Pictures/100000010000073E0000048403EDA729.png" xlink:type="simple" xlink:show="embed" xlink:actuate="onLoad" draw:mime-type="image/png"/></draw:frame><text:soft-page-break/><text:span text:style-name="Source_20_Text"><text:span text:style-name="T29"/></text:span></text:p>
      <text:p text:style-name="P9"><text:span text:style-name="Source_20_Text"><text:span text:style-name="T23">Routing</text:span></text:span></text:p>
      <text:p text:style-name="P9"><text:span text:style-name="Source_20_Text"><text:span text:style-name="T23"/></text:span></text:p>
      <text:p text:style-name="P9"><text:span text:style-name="Source_20_Text"><text:span text:style-name="T30">puts "=== GLOBAL ROUTING ===" </text:span></text:span></text:p>
      <text:p text:style-name="P9"><text:span text:style-name="Source_20_Text"><text:span text:style-name="T30">set_global_routing_layer_adjustment met1 0.65 set_global_routing_layer_adjustment met2 0.3 set_global_routing_layer_adjustment met3 0.3</text:span></text:span></text:p>
      <text:p text:style-name="P9"><text:span text:style-name="Source_20_Text"><text:span text:style-name="T35">set_routing_layers -signal met1-met5 -clock met3-met5</text:span></text:span></text:p>
      <text:p text:style-name="P9"><text:span text:style-name="Source_20_Text"><text:span text:style-name="T31"/></text:span></text:p>
      <text:p text:style-name="P9"><text:span text:style-name="Source_20_Text"><text:span text:style-name="T31">global_route -guide_file route.guide -verbose</text:span></text:span></text:p>
      <text:p text:style-name="P15"><text:span text:style-name="Source_20_Text"><text:span text:style-name="T36">[INFO GRT-0096] Final congestion report:</text:span></text:span></text:p>
      <text:p text:style-name="P3">Layer <text:s text:c="8"/>Resource <text:s text:c="7"/>Demand <text:s text:c="7"/>Usage (%) <text:s text:c="3"/>Max H / Max V / Total Overflow</text:p>
      <text:p text:style-name="P4">---------------------------------------------------------------------------------------</text:p>
      <text:p text:style-name="P4">li1 <text:s text:c="17"/>0 <text:s text:c="12"/>0 <text:s text:c="11"/>0.00% <text:s text:c="12"/>0 / <text:s/>0 / <text:s/>0</text:p>
      <text:p text:style-name="P4">met1 <text:s text:c="12"/>32156 <text:s text:c="9"/>8059 <text:s text:c="10"/>25.06% <text:s text:c="12"/>0 / <text:s/>0 / <text:s/>0</text:p>
      <text:p text:style-name="P4">met2 <text:s text:c="12"/>63366 <text:s text:c="8"/>15703 <text:s text:c="10"/>24.78% <text:s text:c="12"/>0 / <text:s/>0 / <text:s/>0</text:p>
      <text:p text:style-name="P4">met3 <text:s text:c="12"/>47565 <text:s text:c="9"/>9091 <text:s text:c="10"/>19.11% <text:s text:c="12"/>0 / <text:s/>0 / <text:s/>0</text:p>
      <text:p text:style-name="P4">met4 <text:s text:c="12"/>47776 <text:s text:c="9"/>6945 <text:s text:c="10"/>14.54% <text:s text:c="12"/>0 / <text:s/>0 / <text:s/>0</text:p>
      <text:p text:style-name="P4">met5 <text:s text:c="12"/>10960 <text:s text:c="10"/>783 <text:s text:c="11"/>7.14% <text:s text:c="12"/>0 / <text:s/>0 / <text:s/>0</text:p>
      <text:p text:style-name="P4"><text:soft-page-break/>---------------------------------------------------------------------------------------</text:p>
      <text:p text:style-name="P4">Total <text:s text:c="10"/>201823 <text:s text:c="8"/>40581 <text:s text:c="10"/>20.11% <text:s text:c="12"/>0 / <text:s/>0 / <text:s/>0</text:p>
      <text:p text:style-name="P3">[INFO GRT-0018] Total wirelength: 423142 um</text:p>
      <text:p text:style-name="P3">[INFO GRT-0014] Routed nets: 8019</text:p>
      <text:p text:style-name="P3">[INFO GRT-0303] Global routing runtime = 00:00:05</text:p>
      <text:p text:style-name="P9"><text:span text:style-name="Source_20_Text"><text:span text:style-name="T31"/></text:span></text:p>
      <text:p text:style-name="P9"><text:span text:style-name="Source_20_Text"><text:span text:style-name="T31"># ---- Detailed Routing ---- </text:span></text:span></text:p>
      <text:p text:style-name="P9"><text:span text:style-name="Source_20_Text"><text:span text:style-name="T12"/></text:span></text:p>
      <text:p text:style-name="P9"><text:span text:style-name="Source_20_Text"><text:span text:style-name="T31">detailed_route \ -input_guide route.guide \ -bottom_routing_layer met1 \ -top_routing_layer met5 \ -verbose 1 </text:span></text:span></text:p>
      <text:p text:style-name="P9"><text:span text:style-name="Source_20_Text"><text:span text:style-name="T12"/></text:span></text:p>
      <text:p text:style-name="P9"><text:span text:style-name="Source_20_Text"><text:span text:style-name="T31">write_def picorv32_routed.def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7:47:50.028175079</meta:creation-date>
    <dc:date>2026-05-31T19:17:31.314805346</dc:date>
    <meta:editing-duration>PT21M4S</meta:editing-duration>
    <meta:editing-cycles>2</meta:editing-cycles>
    <meta:generator>LibreOffice/24.2.7.2$Linux_X86_64 LibreOffice_project/420$Build-2</meta:generator>
    <meta:document-statistic meta:table-count="1" meta:image-count="7" meta:object-count="0" meta:page-count="9" meta:paragraph-count="124" meta:word-count="593" meta:character-count="5726" meta:non-whitespace-character-count="4127"/>
  </office:meta>
</office:document-meta>
</file>